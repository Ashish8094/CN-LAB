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1456B14194166B633C1.png" manifest:media-type="image/png"/>
  <manifest:file-entry manifest:full-path="Pictures/10000001000003EA00000145003E01BC0CD2378B.png" manifest:media-type="image/png"/>
  <manifest:file-entry manifest:full-path="Pictures/10000001000001D00000015B37A089AB676E24C5.png" manifest:media-type="image/png"/>
  <manifest:file-entry manifest:full-path="Pictures/10000001000003D5000000779200B762E5D4606D.png" manifest:media-type="image/png"/>
  <manifest:file-entry manifest:full-path="Pictures/10000001000001D00000015B3B29D83629587577.png" manifest:media-type="image/png"/>
  <manifest:file-entry manifest:full-path="Pictures/10000001000001F50000016AFE0B2BFBB5AB295B.png" manifest:media-type="image/png"/>
  <manifest:file-entry manifest:full-path="Pictures/10000001000001AC000000E1A3EFEB2CBB21B826.png" manifest:media-type="image/png"/>
  <manifest:file-entry manifest:full-path="Pictures/1000000100000144000002E1EFE716C3ACD291C0.png" manifest:media-type="image/png"/>
  <manifest:file-entry manifest:full-path="Pictures/10000001000001D00000015BFABAD5BB464A63E5.png" manifest:media-type="image/png"/>
  <manifest:file-entry manifest:full-path="Pictures/10000001000001AC000000E173F56D4ECD880615.png" manifest:media-type="image/png"/>
  <manifest:file-entry manifest:full-path="Pictures/10000001000001D00000015B42519BD7D9B87D2F.png" manifest:media-type="image/png"/>
  <manifest:file-entry manifest:full-path="Pictures/10000001000001AC000000E15C90860E5C99BF3D.png" manifest:media-type="image/png"/>
  <manifest:file-entry manifest:full-path="Pictures/10000001000001AC000000E1E51E7DB7BBA3A051.png" manifest:media-type="image/png"/>
  <manifest:file-entry manifest:full-path="Pictures/100000010000014C000002F9C12A2B47C10EDBAC.png" manifest:media-type="image/png"/>
  <manifest:file-entry manifest:full-path="Pictures/10000001000003EA000001456BAC513E38A93957.png" manifest:media-type="image/png"/>
  <manifest:file-entry manifest:full-path="Pictures/100000010000014E000002E2221FA145C3BC4E32.png" manifest:media-type="image/png"/>
  <manifest:file-entry manifest:full-path="Pictures/10000001000001AC000000E11FC8D9FCB8A80B38.png" manifest:media-type="image/png"/>
  <manifest:file-entry manifest:full-path="Pictures/10000001000001F50000016A3F313311CF18A447.png" manifest:media-type="image/png"/>
  <manifest:file-entry manifest:full-path="Pictures/10000001000001F50000016AC2BB574D01A4B079.png" manifest:media-type="image/png"/>
  <manifest:file-entry manifest:full-path="Pictures/10000001000003C60000012B781DB94BA796EC1A.png" manifest:media-type="image/png"/>
  <manifest:file-entry manifest:full-path="Pictures/10000001000004440000018F1A36D506587C7C9F.png" manifest:media-type="image/png"/>
  <manifest:file-entry manifest:full-path="Pictures/10000001000001F50000016A28B1185945FFD997.png" manifest:media-type="image/png"/>
  <manifest:file-entry manifest:full-path="Pictures/10000001000003EA00000145641FA71FDF16FAFA.png" manifest:media-type="image/png"/>
  <manifest:file-entry manifest:full-path="Pictures/100000010000014F000002E75B07692B2EAD1ECA.png" manifest:media-type="image/png"/>
  <manifest:file-entry manifest:full-path="Pictures/10000001000001F50000016A5B3E0AD94DE02164.png" manifest:media-type="image/png"/>
  <manifest:file-entry manifest:full-path="Pictures/10000001000003C100000078A57D19DA3E7F5C07.png" manifest:media-type="image/png"/>
  <manifest:file-entry manifest:full-path="Pictures/10000001000001F50000016A93679ABA9ED2E97E.png" manifest:media-type="image/png"/>
  <manifest:file-entry manifest:full-path="Pictures/10000001000003EA00000145D768FFFDCBD716FC.png" manifest:media-type="image/png"/>
  <manifest:file-entry manifest:full-path="Pictures/10000001000001F50000016A6A0FC03ACF46588A.png" manifest:media-type="image/png"/>
  <manifest:file-entry manifest:full-path="Pictures/10000001000003EA000001458EDB5AA631975433.png" manifest:media-type="image/png"/>
  <manifest:file-entry manifest:full-path="Pictures/10000001000003C50000007892C25966BEA3380A.png" manifest:media-type="image/png"/>
  <manifest:file-entry manifest:full-path="Pictures/10000001000001D00000015BCE33A418913FD6AC.png" manifest:media-type="image/png"/>
  <manifest:file-entry manifest:full-path="Pictures/10000001000003CB0000006AB3D546C7A638FE1A.png" manifest:media-type="image/png"/>
  <manifest:file-entry manifest:full-path="Pictures/10000001000003EA00000145907B560E71FF5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088cm" svg:y="-0.935cm" svg:width="3.498cm" svg:height="1.84cm" draw:z-index="0"><draw:image xlink:href="Pictures/10000001000001AC000000E1E51E7DB7BBA3A051.png" xlink:type="simple" xlink:show="embed" xlink:actuate="onLoad" draw:mime-type="image/png"/></draw:frame><draw:frame draw:style-name="fr1" draw:name="Image2" text:anchor-type="char" svg:x="2.478cm" svg:y="-1cm" svg:width="2.757cm" svg:height="1.45cm" draw:z-index="1"><draw:image xlink:href="Pictures/10000001000001AC000000E173F56D4ECD880615.png" xlink:type="simple" xlink:show="embed" xlink:actuate="onLoad" draw:mime-type="image/png"/></draw:frame><draw:frame draw:style-name="fr1" draw:name="Image3" text:anchor-type="char" svg:x="7.53cm" svg:y="-1.109cm" svg:width="2.355cm" svg:height="1.238cm" draw:z-index="2"><draw:image xlink:href="Pictures/10000001000001AC000000E1A3EFEB2CBB21B826.png" xlink:type="simple" xlink:show="embed" xlink:actuate="onLoad" draw:mime-type="image/png"/></draw:frame><draw:frame draw:style-name="fr1" draw:name="Image4" text:anchor-type="char" svg:x="5.456cm" svg:y="-1.018cm" svg:width="1.949cm" svg:height="1.025cm" draw:z-index="3"><draw:image xlink:href="Pictures/10000001000001AC000000E15C90860E5C99BF3D.png" xlink:type="simple" xlink:show="embed" xlink:actuate="onLoad" draw:mime-type="image/png"/></draw:frame><draw:frame draw:style-name="fr1" draw:name="Image5" text:anchor-type="char" svg:x="10.045cm" svg:y="-0.91cm" svg:width="2.272cm" svg:height="1.196cm" draw:z-index="4"><draw:image xlink:href="Pictures/10000001000001AC000000E11FC8D9FCB8A80B38.png" xlink:type="simple" xlink:show="embed" xlink:actuate="onLoad" draw:mime-type="image/png"/></draw:frame><draw:frame draw:style-name="fr1" draw:name="Image6" text:anchor-type="char" svg:x="14.956cm" svg:y="7.181cm" svg:width="1.483cm" svg:height="3.288cm" draw:z-index="5"><draw:image xlink:href="Pictures/100000010000014F000002E75B07692B2EAD1ECA.png" xlink:type="simple" xlink:show="embed" xlink:actuate="onLoad" draw:mime-type="image/png"/></draw:frame><draw:frame draw:style-name="fr1" draw:name="Image7" text:anchor-type="char" svg:x="-1.166cm" svg:y="8.983cm" svg:width="7.869cm" svg:height="0.956cm" draw:z-index="6"><draw:image xlink:href="Pictures/10000001000003D5000000779200B762E5D4606D.png" xlink:type="simple" xlink:show="embed" xlink:actuate="onLoad" draw:mime-type="image/png"/></draw:frame><draw:frame draw:style-name="fr1" draw:name="Image8" text:anchor-type="char" svg:x="-1.166cm" svg:y="9.938cm" svg:width="7.939cm" svg:height="0.988cm" draw:z-index="7"><draw:image xlink:href="Pictures/10000001000003C50000007892C25966BEA3380A.png" xlink:type="simple" xlink:show="embed" xlink:actuate="onLoad" draw:mime-type="image/png"/></draw:frame><draw:frame draw:style-name="fr1" draw:name="Image9" text:anchor-type="char" svg:x="13.282cm" svg:y="7.16cm" svg:width="1.503cm" svg:height="3.415cm" draw:z-index="8"><draw:image xlink:href="Pictures/1000000100000144000002E1EFE716C3ACD291C0.png" xlink:type="simple" xlink:show="embed" xlink:actuate="onLoad" draw:mime-type="image/png"/></draw:frame><draw:frame draw:style-name="fr1" draw:name="Image10" text:anchor-type="char" svg:x="-0.702cm" svg:y="1.365cm" svg:width="1.466cm" svg:height="1.097cm" draw:z-index="9"><draw:image xlink:href="Pictures/10000001000001D00000015B3B29D83629587577.png" xlink:type="simple" xlink:show="embed" xlink:actuate="onLoad" draw:mime-type="image/png"/></draw:frame><draw:frame draw:style-name="fr1" draw:name="Image11" text:anchor-type="char" svg:x="1.064cm" svg:y="1.136cm" svg:width="1.954cm" svg:height="1.462cm" draw:z-index="10"><draw:image xlink:href="Pictures/10000001000001D00000015BCE33A418913FD6AC.png" xlink:type="simple" xlink:show="embed" xlink:actuate="onLoad" draw:mime-type="image/png"/></draw:frame><draw:frame draw:style-name="fr1" draw:name="Image13" text:anchor-type="char" svg:x="3.491cm" svg:y="1.014cm" svg:width="2.057cm" svg:height="1.538cm" draw:z-index="11"><draw:image xlink:href="Pictures/10000001000001D00000015B42519BD7D9B87D2F.png" xlink:type="simple" xlink:show="embed" xlink:actuate="onLoad" draw:mime-type="image/png"/></draw:frame><draw:frame draw:style-name="fr1" draw:name="Image14" text:anchor-type="char" svg:x="6.066cm" svg:y="1.254cm" svg:width="1.692cm" svg:height="1.265cm" draw:z-index="12"><draw:image xlink:href="Pictures/10000001000001D00000015B37A089AB676E24C5.png" xlink:type="simple" xlink:show="embed" xlink:actuate="onLoad" draw:mime-type="image/png"/></draw:frame><draw:frame draw:style-name="fr1" draw:name="Image15" text:anchor-type="char" svg:x="8.232cm" svg:y="1.134cm" svg:width="2.076cm" svg:height="1.552cm" draw:z-index="13"><draw:image xlink:href="Pictures/10000001000001D00000015BFABAD5BB464A63E5.png" xlink:type="simple" xlink:show="embed" xlink:actuate="onLoad" draw:mime-type="image/png"/></draw:frame><draw:frame draw:style-name="fr1" draw:name="Image12" text:anchor-type="char" svg:x="-1.256cm" svg:y="3.228cm" svg:width="2.655cm" svg:height="1.919cm" draw:z-index="14"><draw:image xlink:href="Pictures/10000001000001F50000016AFE0B2BFBB5AB295B.png" xlink:type="simple" xlink:show="embed" xlink:actuate="onLoad" draw:mime-type="image/png"/></draw:frame><draw:frame draw:style-name="fr1" draw:name="Image16" text:anchor-type="char" svg:x="1.778cm" svg:y="3.302cm" svg:width="2.602cm" svg:height="1.88cm" draw:z-index="15"><draw:image xlink:href="Pictures/10000001000001F50000016A3F313311CF18A447.png" xlink:type="simple" xlink:show="embed" xlink:actuate="onLoad" draw:mime-type="image/png"/></draw:frame><draw:frame draw:style-name="fr1" draw:name="Image17" text:anchor-type="char" svg:x="4.565cm" svg:y="3.334cm" svg:width="2.473cm" svg:height="1.787cm" draw:z-index="16"><draw:image xlink:href="Pictures/10000001000001F50000016AC2BB574D01A4B079.png" xlink:type="simple" xlink:show="embed" xlink:actuate="onLoad" draw:mime-type="image/png"/></draw:frame><draw:frame draw:style-name="fr1" draw:name="Image18" text:anchor-type="char" svg:x="7.133cm" svg:y="3.304cm" svg:width="2.344cm" svg:height="1.695cm" draw:z-index="17"><draw:image xlink:href="Pictures/10000001000001F50000016A28B1185945FFD997.png" xlink:type="simple" xlink:show="embed" xlink:actuate="onLoad" draw:mime-type="image/png"/></draw:frame><draw:frame draw:style-name="fr1" draw:name="Image19" text:anchor-type="char" svg:x="9.537cm" svg:y="3.418cm" svg:width="2.067cm" svg:height="1.494cm" draw:z-index="18"><draw:image xlink:href="Pictures/10000001000001F50000016A5B3E0AD94DE02164.png" xlink:type="simple" xlink:show="embed" xlink:actuate="onLoad" draw:mime-type="image/png"/></draw:frame><draw:frame draw:style-name="fr1" draw:name="Image20" text:anchor-type="char" svg:x="11.779cm" svg:y="3.448cm" svg:width="1.937cm" svg:height="1.399cm" draw:z-index="19"><draw:image xlink:href="Pictures/10000001000001F50000016A93679ABA9ED2E97E.png" xlink:type="simple" xlink:show="embed" xlink:actuate="onLoad" draw:mime-type="image/png"/></draw:frame><draw:frame draw:style-name="fr1" draw:name="Image21" text:anchor-type="char" svg:x="13.907cm" svg:y="3.706cm" svg:width="1.725cm" svg:height="1.247cm" draw:z-index="20"><draw:image xlink:href="Pictures/10000001000001F50000016A6A0FC03ACF46588A.png" xlink:type="simple" xlink:show="embed" xlink:actuate="onLoad" draw:mime-type="image/png"/></draw:frame><draw:frame draw:style-name="fr1" draw:name="Image22" text:anchor-type="char" svg:x="11.546cm" svg:y="7.128cm" svg:width="1.512cm" svg:height="3.464cm" draw:z-index="21"><draw:image xlink:href="Pictures/100000010000014C000002F9C12A2B47C10EDBAC.png" xlink:type="simple" xlink:show="embed" xlink:actuate="onLoad" draw:mime-type="image/png"/></draw:frame><draw:frame draw:style-name="fr1" draw:name="Image23" text:anchor-type="char" svg:x="-1.334cm" svg:y="10.924cm" svg:width="8.299cm" svg:height="0.907cm" draw:z-index="22"><draw:image xlink:href="Pictures/10000001000003CB0000006AB3D546C7A638FE1A.png" xlink:type="simple" xlink:show="embed" xlink:actuate="onLoad" draw:mime-type="image/png"/></draw:frame><draw:frame draw:style-name="fr1" draw:name="Image24" text:anchor-type="char" svg:x="-1.376cm" svg:y="5.523cm" svg:width="2.889cm" svg:height="1.057cm" draw:z-index="23"><draw:image xlink:href="Pictures/10000001000004440000018F1A36D506587C7C9F.png" xlink:type="simple" xlink:show="embed" xlink:actuate="onLoad" draw:mime-type="image/png"/></draw:frame><draw:frame draw:style-name="fr1" draw:name="Image25" text:anchor-type="char" svg:x="1.672cm" svg:y="5.66cm" svg:width="2.448cm" svg:height="0.796cm" draw:z-index="24"><draw:image xlink:href="Pictures/10000001000003EA00000145D768FFFDCBD716FC.png" xlink:type="simple" xlink:show="embed" xlink:actuate="onLoad" draw:mime-type="image/png"/></draw:frame><draw:frame draw:style-name="fr1" draw:name="Image26" text:anchor-type="char" svg:x="4.256cm" svg:y="5.6cm" svg:width="2.215cm" svg:height="0.718cm" draw:z-index="25"><draw:image xlink:href="Pictures/10000001000003EA000001456BAC513E38A93957.png" xlink:type="simple" xlink:show="embed" xlink:actuate="onLoad" draw:mime-type="image/png"/></draw:frame><draw:frame draw:style-name="fr1" draw:name="Image27" text:anchor-type="char" svg:x="6.583cm" svg:y="5.519cm" svg:width="2.411cm" svg:height="0.783cm" draw:z-index="26"><draw:image xlink:href="Pictures/10000001000003EA000001458EDB5AA631975433.png" xlink:type="simple" xlink:show="embed" xlink:actuate="onLoad" draw:mime-type="image/png"/></draw:frame><draw:frame draw:style-name="fr1" draw:name="Image28" text:anchor-type="char" svg:x="9.208cm" svg:y="5.662cm" svg:width="2.155cm" svg:height="0.7cm" draw:z-index="27"><draw:image xlink:href="Pictures/10000001000003EA00000145907B560E71FF5972.png" xlink:type="simple" xlink:show="embed" xlink:actuate="onLoad" draw:mime-type="image/png"/></draw:frame><draw:frame draw:style-name="fr1" draw:name="Image29" text:anchor-type="char" svg:x="11.506cm" svg:y="5.584cm" svg:width="2.443cm" svg:height="0.794cm" draw:z-index="28"><draw:image xlink:href="Pictures/10000001000003EA00000145641FA71FDF16FAFA.png" xlink:type="simple" xlink:show="embed" xlink:actuate="onLoad" draw:mime-type="image/png"/></draw:frame><draw:frame draw:style-name="fr1" draw:name="Image30" text:anchor-type="char" svg:x="14.102cm" svg:y="5.646cm" svg:width="2.475cm" svg:height="0.803cm" draw:z-index="29"><draw:image xlink:href="Pictures/10000001000003EA00000145003E01BC0CD2378B.png" xlink:type="simple" xlink:show="embed" xlink:actuate="onLoad" draw:mime-type="image/png"/></draw:frame><draw:frame draw:style-name="fr1" draw:name="Image31" text:anchor-type="char" svg:x="16.612cm" svg:y="5.72cm" svg:width="2.388cm" svg:height="0.776cm" draw:z-index="30"><draw:image xlink:href="Pictures/10000001000003EA000001456B14194166B633C1.png" xlink:type="simple" xlink:show="embed" xlink:actuate="onLoad" draw:mime-type="image/png"/></draw:frame><draw:frame draw:style-name="fr1" draw:name="Image32" text:anchor-type="char" svg:x="9.5cm" svg:y="7.084cm" svg:width="1.87cm" svg:height="4.129cm" draw:z-index="31"><draw:image xlink:href="Pictures/100000010000014E000002E2221FA145C3BC4E32.png" xlink:type="simple" xlink:show="embed" xlink:actuate="onLoad" draw:mime-type="image/png"/></draw:frame><draw:frame draw:style-name="fr1" draw:name="Image33" text:anchor-type="char" svg:x="-1.334cm" svg:y="11.829cm" svg:width="8.281cm" svg:height="1.034cm" draw:z-index="32"><draw:image xlink:href="Pictures/10000001000003C100000078A57D19DA3E7F5C07.png" xlink:type="simple" xlink:show="embed" xlink:actuate="onLoad" draw:mime-type="image/png"/></draw:frame><draw:frame draw:style-name="fr1" draw:name="Image34" text:anchor-type="char" svg:x="-1.558cm" svg:y="6.655cm" svg:width="3.286cm" svg:height="1.018cm" draw:z-index="33"><draw:image xlink:href="Pictures/10000001000003C60000012B781DB94BA796EC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3T11:32:40.176784126</meta:creation-date>
    <dc:date>2026-07-23T12:16:07.168624313</dc:date>
    <meta:editing-duration>PT12M22S</meta:editing-duration>
    <meta:editing-cycles>2</meta:editing-cycles>
    <meta:generator>LibreOffice/7.3.7.2$Linux_X86_64 LibreOffice_project/30$Build-2</meta:generator>
    <meta:document-statistic meta:table-count="0" meta:image-count="34" meta:object-count="0" meta:page-count="1" meta:paragraph-count="0" meta:word-count="0" meta:character-count="0" meta:non-whitespace-character-count="0"/>
  </office:meta>
</office:document-meta>
</file>